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presentation="urn:oasis:names:tc:opendocument:xmlns:presentation:1.0" xmlns:svg="urn:oasis:names:tc:opendocument:xmlns:svg-compatible:1.0" xmlns:xlink="http://www.w3.org/1999/xlink">
  <office:scripts/>
  <office:automatic-styles>
    <style:style style:name="dp1" style:family="drawing">
      <style:graphic-properties draw:fill="solid" draw:fill-color="#2c3e50"/>
    </style:style>
  </office:automatic-styles>
  <office:body>
    <presentation:presentation>
      <presentation:slide draw:id="slide1" draw:name="Slide1" presentation:page-layout-name="AL1">
        <draw:page-thumbnail draw:page-number="1" xlink:href="#"/>
        <draw:frame presentation:class="title" svg:x="2cm" svg:y="2cm" svg:width="20cm" svg:height="4cm">
          <draw:text-box>
            <text:p><text:span>CAT CLICKER</text:span></text:p>
          </draw:text-box>
        </draw:frame>
        <draw:frame svg:x="2cm" svg:y="7cm" svg:width="20cm" svg:height="3cm">
          <draw:text-box>
            <text:p><text:span>Un jeu de clicker passionnant!</text:span></text:p>
          </draw:text-box>
        </draw:frame>
      </presentation:slide>
      <presentation:slide draw:id="slide2" draw:name="Slide2" presentation:page-layout-name="AL2">
        <draw:frame presentation:class="title" svg:x="2cm" svg:y="0.5cm" svg:width="20cm" svg:height="2cm">
          <draw:text-box>
            <text:p><text:span>Concept du Jeu</text:span></text:p>
          </draw:text-box>
        </draw:frame>
        <draw:frame svg:x="2cm" svg:y="2.5cm" svg:width="20cm" svg:height="6cm">
          <draw:text-box>
            <text:p><text:span>Cliquez sur les chats qui apparaissent</text:span></text:p>
            <text:p><text:span>Gagnez des points pour chaque chat clique</text:span></text:p>
            <text:p><text:span>Vous avez 3 vies au depart</text:span></text:p>
            <text:p><text:span>Progressez a travers plusieurs niveaux</text:span></text:p>
            <text:p><text:span>Attrapez le maximum de chats!</text:span></text:p>
          </draw:text-box>
        </draw:frame>
      </presentation:slide>
      <presentation:slide draw:id="slide3" draw:name="Slide3" presentation:page-layout-name="AL2">
        <draw:frame presentation:class="title" svg:x="2cm" svg:y="0.5cm" svg:width="20cm" svg:height="2cm">
          <draw:text-box>
            <text:p><text:span>Mecaniques de Jeu</text:span></text:p>
          </draw:text-box>
        </draw:frame>
        <draw:frame svg:x="2cm" svg:y="2.5cm" svg:width="20cm" svg:height="6cm">
          <draw:text-box>
            <text:p><text:span>Deux types de chats: colores et noirs</text:span></text:p>
            <text:p><text:span>Les chats apparaissent de plus en plus vite</text:span></text:p>
            <text:p><text:span>Arriere-plan avec une maison de nuit</text:span></text:p>
            <text:p><text:span>Theme sombre et theme clair disponibles</text:span></text:p>
            <text:p><text:span>Effets sonores pour plus d immersion</text:span></text:p>
          </draw:text-box>
        </draw:frame>
      </presentation:slide>
      <presentation:slide draw:id="slide4" draw:name="Slide4" presentation:page-layout-name="AL2">
        <draw:frame presentation:class="title" svg:x="2cm" svg:y="0.5cm" svg:width="20cm" svg:height="2cm">
          <draw:text-box>
            <text:p><text:span>Systeme de Niveaux</text:span></text:p>
          </draw:text-box>
        </draw:frame>
        <draw:frame svg:x="2cm" svg:y="2.5cm" svg:width="20cm" svg:height="6cm">
          <draw:text-box>
            <text:p><text:span>5 chats a attraper par niveau</text:span></text:p>
            <text:p><text:span>Augmentation progressive de la difficulte</text:span></text:p>
            <text:p><text:span>Vitesse d apparition qui augmente</text:span></text:p>
            <text:p><text:span>Jusqu a 10 niveaux differents</text:span></text:p>
            <text:p><text:span>Defi croissant a chaque niveau</text:span></text:p>
          </draw:text-box>
        </draw:frame>
      </presentation:slide>
      <presentation:slide draw:id="slide5" draw:name="Slide5" presentation:page-layout-name="AL2">
        <draw:frame presentation:class="title" svg:x="2cm" svg:y="0.5cm" svg:width="20cm" svg:height="2cm">
          <draw:text-box>
            <text:p><text:span>Fonctionnalites Audio-Visuelles</text:span></text:p>
          </draw:text-box>
        </draw:frame>
        <draw:frame svg:x="2cm" svg:y="2.5cm" svg:width="20cm" svg:height="6cm">
          <draw:text-box>
            <text:p><text:span>Deux themes visuels: sombre et clair</text:span></text:p>
            <text:p><text:span>Effet sonore de clic</text:span></text:p>
            <text:p><text:span>Bruit de miaou authentique</text:span></text:p>
            <text:p><text:span>Son de coup reussi</text:span></text:p>
            <text:p><text:span>Son de gameover</text:span></text:p>
          </draw:text-box>
        </draw:frame>
      </presentation:slide>
      <presentation:slide draw:id="slide6" draw:name="Slide6" presentation:page-layout-name="AL2">
        <draw:frame presentation:class="title" svg:x="2cm" svg:y="0.5cm" svg:width="20cm" svg:height="2cm">
          <draw:text-box>
            <text:p><text:span>Objectifs de Jouabilite</text:span></text:p>
          </draw:text-box>
        </draw:frame>
        <draw:frame svg:x="2cm" svg:y="2.5cm" svg:width="20cm" svg:height="6cm">
          <draw:text-box>
            <text:p><text:span>Obtenir le score le plus eleve possible</text:span></text:p>
            <text:p><text:span>Ameliorer votre vitesse de clic</text:span></text:p>
            <text:p><text:span>Progresser a travers tous les niveaux</text:span></text:p>
            <text:p><text:span>Relever le defi de la difficulte croissante</text:span></text:p>
            <text:p><text:span>Devenir un maitre du clicker de chats</text:span></text:p>
          </draw:text-box>
        </draw:frame>
      </presentation:slide>
      <presentation:slide draw:id="slide7" draw:name="Slide7" presentation:page-layout-name="AL1">
        <draw:frame presentation:class="title" svg:x="2cm" svg:y="2cm" svg:width="20cm" svg:height="4cm">
          <draw:text-box>
            <text:p><text:span>Pret a jouer?</text:span></text:p>
          </draw:text-box>
        </draw:frame>
        <draw:frame svg:x="2cm" svg:y="7cm" svg:width="20cm" svg:height="3cm">
          <draw:text-box>
            <text:p><text:span>Lancez le jeu et commencez a cliquer!</text:span></text:p>
          </draw:text-box>
        </draw:frame>
      </presentation:slide>
    </presentation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/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dc:creator>Cat Clicker</dc:creator>
    <dc:title>Cat Clicker Presentation</dc:title>
    <meta:creation-date>2026-04-21T00:00:00</meta:creation-date>
  </office:meta>
</office:document-meta>
</file>