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874be"/>
    </style:style>
    <style:style style:name="P2" style:family="paragraph" style:parent-style-name="Text_20_body">
      <style:text-properties officeooo:paragraph-rsid="000874be"/>
    </style:style>
    <style:style style:name="P3" style:family="paragraph" style:parent-style-name="Standard">
      <style:text-properties officeooo:rsid="000874be" officeooo:paragraph-rsid="000874b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T1" style:family="text">
      <style:text-properties officeooo:rsid="00090c60"/>
    </style:style>
    <style:style style:name="T2" style:family="text">
      <style:text-properties officeooo:rsid="000a872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esentation de cultutre digitale : la communocation dans les projets informatiques </text:p>
      <text:p text:style-name="P2"/>
      <text:h text:style-name="Heading_20_1" text:outline-level="1">🖥️ 1. Introduction <text:span text:style-name="T1">chada 1</text:span></text:h>
      <text:list xml:id="list2397292618" text:style-name="L1">
        <text:list-item>
          <text:p text:style-name="P4">Définition de la communication dans un projet IT</text:p>
        </text:list-item>
        <text:list-item>
          <text:p text:style-name="P4">Importance de la communication</text:p>
        </text:list-item>
        <text:list-item>
          <text:p text:style-name="P4">Objectifs de la présentation</text:p>
        </text:list-item>
      </text:list>
      <text:p text:style-name="Horizontal_20_Line"/>
      <text:h text:style-name="Heading_20_1" text:outline-level="1">📊 2. Le rôle de la communication dans un projet informatique <text:span text:style-name="T1">maryem 4</text:span></text:h>
      <text:list xml:id="list1959057129" text:style-name="L2">
        <text:list-item>
          <text:p text:style-name="P5">Coordination des équipes</text:p>
        </text:list-item>
        <text:list-item>
          <text:p text:style-name="P5">Transmission des informations</text:p>
        </text:list-item>
        <text:list-item>
          <text:p text:style-name="P5">Prise de décision</text:p>
        </text:list-item>
        <text:list-item>
          <text:p text:style-name="P5">Réduction des erreurs</text:p>
        </text:list-item>
      </text:list>
      <text:p text:style-name="Horizontal_20_Line"/>
      <text:h text:style-name="Heading_20_1" text:outline-level="1">👥 3. Les acteurs de la communication <text:s/><text:span text:style-name="T2">chada 5</text:span></text:h>
      <text:list xml:id="list229306490" text:style-name="L3">
        <text:list-item>
          <text:p text:style-name="P6">Chef de projet</text:p>
        </text:list-item>
        <text:list-item>
          <text:p text:style-name="P6">Développeurs</text:p>
        </text:list-item>
        <text:list-item>
          <text:p text:style-name="P6">Clients / utilisateurs</text:p>
        </text:list-item>
        <text:list-item>
          <text:p text:style-name="P6">Équipe technique (QA, DevOps…)</text:p>
        </text:list-item>
      </text:list>
      <text:p text:style-name="Horizontal_20_Line"/>
      <text:h text:style-name="Heading_20_1" text:outline-level="1">🔄 4. Types de communication <text:span text:style-name="T2">chada 6</text:span></text:h>
      <text:list xml:id="list2042106066" text:style-name="L4">
        <text:list-item>
          <text:p text:style-name="P7">Communication interne vs externe</text:p>
        </text:list-item>
        <text:list-item>
          <text:p text:style-name="P7">Communication formelle vs informelle</text:p>
        </text:list-item>
        <text:list-item>
          <text:p text:style-name="P7">Communication synchrone vs asynchrone</text:p>
        </text:list-item>
      </text:list>
      <text:p text:style-name="Horizontal_20_Line"/>
      <text:h text:style-name="Heading_20_1" text:outline-level="1"><text:soft-page-break/></text:h>
      <text:p text:style-name="Horizontal_20_Line"/>
      <text:p text:style-name="Text_20_body"/>
      <text:p text:style-name="Horizontal_20_Line"/>
      <text:h text:style-name="Heading_20_1" text:outline-level="1">⚠️ 7. Problèmes de communication dans les projets IT <text:span text:style-name="T2">meryem 2</text:span></text:h>
      <text:list xml:id="list3951843431" text:style-name="L5">
        <text:list-item>
          <text:p text:style-name="P8"><text:tab/>compréhension des besoins</text:p>
        </text:list-item>
        <text:list-item>
          <text:p text:style-name="P8">Manque de clarté</text:p>
        </text:list-item>
        <text:list-item>
          <text:p text:style-name="P8">Retards dus à une mauvaise communication</text:p>
        </text:list-item>
        <text:list-item>
          <text:p text:style-name="P8">Conflits dans l’équipe</text:p>
        </text:list-item>
      </text:list>
      <text:p text:style-name="Horizontal_20_Line"/>
      <text:h text:style-name="Heading_20_1" text:outline-level="1">✅ 8. Bonnes pratiques <text:span text:style-name="T1">maryem meryem 3 </text:span></text:h>
      <text:list xml:id="list872262819" text:style-name="L6">
        <text:list-item>
          <text:p text:style-name="P9">Communication claire et concise</text:p>
        </text:list-item>
        <text:list-item>
          <text:p text:style-name="P9">Écoute active</text:p>
        </text:list-item>
        <text:list-item>
          <text:p text:style-name="P9">Documentation régulière</text:p>
        </text:list-item>
        <text:list-item>
          <text:p text:style-name="P9">Feedback constant</text:p>
        </text:list-item>
        <text:list-item>
          <text:p text:style-name="P9">Utilisation des bons outils</text:p>
        </text:list-item>
      </text:list>
      <text:p text:style-name="Horizontal_20_Line"/>
      <text:h text:style-name="Heading_20_1" text:outline-level="1">📈 9. Impact d’une bonne communication <text:span text:style-name="T2">chada 7</text:span></text:h>
      <text:list xml:id="list4123198825" text:style-name="L7">
        <text:list-item>
          <text:p text:style-name="P10">Réussite du projet</text:p>
        </text:list-item>
        <text:list-item>
          <text:p text:style-name="P10">Respect des délais</text:p>
        </text:list-item>
        <text:list-item>
          <text:p text:style-name="P10">Satisfaction client</text:p>
        </text:list-item>
        <text:list-item>
          <text:p text:style-name="P10">Meilleure collaboration</text:p>
        </text:list-item>
      </text:list>
      <text:p text:style-name="Horizontal_20_Line"/>
      <text:h text:style-name="Heading_20_1" text:outline-level="1"/>
      <text:p text:style-name="Horizontal_20_Line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M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M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03T14:11:32.184000000</meta:creation-date>
    <dc:date>2026-04-07T15:29:38.480000000</dc:date>
    <meta:editing-duration>PT1H3M44S</meta:editing-duration>
    <meta:editing-cycles>3</meta:editing-cycles>
    <meta:generator>Neat_Office/6.2.8.2$Windows_x86 LibreOffice_project/</meta:generator>
    <meta:document-statistic meta:table-count="0" meta:image-count="0" meta:object-count="0" meta:page-count="3" meta:paragraph-count="35" meta:word-count="188" meta:character-count="1101" meta:non-whitespace-character-count="971"/>
  </office:meta>
</office:document-meta>
</file>